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Compact" style:list-style-name="WWNum1001"/>
    <style:style style:name="P2" style:family="paragraph" style:parent-style-name="Compact" style:list-style-name="WWNum1002"/>
    <style:style style:name="P3" style:family="paragraph" style:parent-style-name="Compact" style:list-style-name="WWNum1003"/>
    <style:style style:name="P4" style:family="paragraph" style:parent-style-name="Compact" style:list-style-name="WWNum1004"/>
    <style:style style:name="P5" style:family="paragraph" style:parent-style-name="Compact" style:list-style-name="WWNum1005"/>
    <style:style style:name="P6" style:family="paragraph" style:parent-style-name="Compact" style:list-style-name="WWNum1006"/>
    <style:style style:name="P7" style:family="paragraph" style:parent-style-name="Compact" style:list-style-name="WWNum1007"/>
    <style:style style:name="P8" style:family="paragraph" style:parent-style-name="Compact" style:list-style-name="WWNum1008"/>
    <style:style style:name="P9" style:family="paragraph" style:parent-style-name="Compact" style:list-style-name="WWNum1009"/>
    <style:style style:name="P10" style:family="paragraph" style:parent-style-name="Compact" style:list-style-name="WWNum1010"/>
    <style:style style:name="P11" style:family="paragraph" style:parent-style-name="Compact" style:list-style-name="WWNum1011"/>
    <style:style style:name="P12" style:family="paragraph" style:parent-style-name="Compact" style:list-style-name="WWNum1012"/>
    <style:style style:name="P13" style:family="paragraph" style:parent-style-name="Compact" style:list-style-name="WWNum1013"/>
    <style:style style:name="P14" style:family="paragraph" style:parent-style-name="Compact" style:list-style-name="WWNum1014"/>
    <style:style style:name="P15" style:family="paragraph">
      <loext:graphic-properties draw:fill="solid" draw:fill-color="#ffffff"/>
      <style:paragraph-properties fo:text-align="center"/>
    </style:style>
    <style:style style:name="T1" style:family="text">
      <style:text-properties fo:font-weight="bold" style:font-weight-asian="bold" style:font-weight-complex="bold"/>
    </style:style>
    <style:style style:name="T2" style:family="text">
      <style:text-properties officeooo:rsid="00003a97"/>
    </style:style>
    <style:style style:name="gr1" style:family="graphic">
      <style:graphic-properties draw:stroke="solid" svg:stroke-width="0in" svg:stroke-color="#000000" draw:stroke-linejoin="round" svg:stroke-linecap="butt" draw:fill="solid" draw:fill-color="#ffffff"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rapport-de-projet"/>RAPPORT DE PROJET<text:bookmark-end text:name="rapport-de-projet"/></text:h>
      <text:h text:style-name="Heading_20_1" text:outline-level="1"><text:bookmark-start text:name="Xf2ee52ba668a4389ba92e6e70a7c1fa9ebe6798"/>Implémentation du jeu du Songo en version locale et distante</text:h>
      <text:h text:style-name="Heading_20_2" text:outline-level="2"><text:bookmark-start text:name="informations-générales"/>Informations générales</text:h>
      <text:p text:style-name="First_20_Paragraph"><text:span text:style-name="T1">Titre du projet :</text:span> Implémentation web du jeu du Songo<text:line-break/><text:span text:style-name="T1">Versions réalisées :</text:span> Version locale et version distante<text:line-break/><text:span text:style-name="T1">Technologies utilisées :</text:span> HTML, CSS, JavaScript, Ajax, PHP, MySQL<text:line-break/><text:span text:style-name="T1">Serveur local utilisé :</text:span> Apache avec PHP et MySQL<text:line-break/><text:span text:style-name="T1">Base de données :</text:span> MySQL<text:line-break/><text:span text:style-name="T1">Auteur :</text:span> <text:span text:style-name="T2">Youmbi Chloe</text:span><text:line-break/><text:span text:style-name="T1">Classe :</text:span> <text:span text:style-name="T2">L2 INFO</text:span><text:line-break/><text:span text:style-name="T1">Année académique :</text:span> <text:span text:style-name="T2">2025-2026</text:span></text:p>
      <text:p text:style-name="Standard"><draw:rect text:anchor-type="as-char" style:rel-width="100%" draw:z-index="0" draw:name="Shape1" draw:style-name="gr1" draw:text-style-name="P15" svg:width="6.5004in" svg:height="0.0213in"><text:p/></draw:rect><text:bookmark-end text:name="Xf2ee52ba668a4389ba92e6e70a7c1fa9ebe6798"/><text:bookmark-end text:name="informations-générales"/></text:p>
      <text:h text:style-name="Heading_20_1" text:outline-level="1"><text:bookmark-start text:name="introduction"/>Introduction</text:h>
      <text:p text:style-name="First_20_Paragraph">Dans le cadre de ce projet, il nous a été demandé de réaliser une application web permettant de jouer au jeu du Songo. Le Songo est un jeu traditionnel africain de semailles qui se joue à deux joueurs. Il oppose deux camps, généralement appelés NORD et SUD dans notre implémentation.</text:p>
      <text:p text:style-name="Text_20_body">Le plateau du jeu est composé de deux rangées de sept cases. Au début de la partie, chaque case contient cinq graines. Les joueurs jouent chacun à leur tour en choisissant une case de leur camp, puis en distribuant les graines de cette case dans les cases suivantes selon un sens de semis précis. L’objectif du jeu est de capturer le plus grand nombre de graines possible.</text:p>
      <text:p text:style-name="Text_20_body">Le projet a été réalisé en deux versions :</text:p>
      <text:list xml:id="list4060925473" text:style-name="WWNum1001">
        <text:list-item>
          <text:p text:style-name="P1">une version locale, dans laquelle deux joueurs jouent sur la même page web ;</text:p>
        </text:list-item>
        <text:list-item>
          <text:p text:style-name="P1">une version distante, dans laquelle deux joueurs peuvent jouer depuis deux navigateurs différents grâce à une communication entre le navigateur, le serveur PHP et une base de données MySQL.</text:p>
        </text:list-item>
      </text:list>
      <text:p text:style-name="First_20_Paragraph">Ce rapport présente le fonctionnement du jeu, le principe général de chaque version, les algorithmes utilisés, l’organisation du code, ainsi que les règles particulières prises en compte dans l’application.</text:p>
      <text:p text:style-name="Standard"><draw:rect text:anchor-type="as-char" style:rel-width="100%" draw:z-index="1" draw:name="Shape2" draw:style-name="gr1" draw:text-style-name="P15" svg:width="6.5004in" svg:height="0.0213in"><text:p/></draw:rect><text:bookmark-end text:name="introduction"/></text:p>
      <text:h text:style-name="Heading_20_1" text:outline-level="1"><text:bookmark-start text:name="i.-présentation-générale-du-jeu-du-songo"/><text:soft-page-break/>I. Présentation générale du jeu du Songo</text:h>
      <text:h text:style-name="Heading_20_2" text:outline-level="2"><text:bookmark-start text:name="principe-du-jeu"/>1. Principe du jeu</text:h>
      <text:p text:style-name="First_20_Paragraph">Le Songo est un jeu de stratégie qui se joue à deux joueurs. Dans notre application, les deux joueurs sont appelés :</text:p>
      <text:list xml:id="list20107608390696" text:continue-list="list4060925473" text:style-name="WWNum1002">
        <text:list-item>
          <text:p text:style-name="P2"><text:span text:style-name="T1">NORD</text:span> ;</text:p>
        </text:list-item>
        <text:list-item>
          <text:p text:style-name="P2"><text:span text:style-name="T1">SUD</text:span>.</text:p>
        </text:list-item>
      </text:list>
      <text:p text:style-name="First_20_Paragraph">Chaque joueur possède un camp composé de sept cases. Les cases sont numérotées de 1 à 7. Au début de la partie, chaque case contient cinq graines. Le total initial est donc de soixante-dix graines.</text:p>
      <text:p text:style-name="Text_20_body">Chaque joueur joue à tour de rôle. Lorsqu’un joueur joue, il choisit une case non vide de son propre camp. Toutes les graines de cette case sont prises, la case est vidée, puis les graines sont distribuées une par une dans les cases suivantes.</text:p>
      <text:p text:style-name="Text_20_body">Le but du jeu est de capturer les graines du camp adverse selon des règles précises. Le joueur qui atteint au moins quarante graines capturées gagne la partie.<text:bookmark-end text:name="principe-du-jeu"/></text:p>
      <text:h text:style-name="Heading_20_2" text:outline-level="2"><text:bookmark-start text:name="X8ea425005c4c1a678267fdd16c194cccc062a79"/>2. Représentation du plateau dans le programme</text:h>
      <text:p text:style-name="First_20_Paragraph">Dans le programme, chaque camp est représenté par un tableau de sept valeurs.</text:p>
      <text:p text:style-name="Text_20_body">Exemple :</text:p>
      <text:p text:style-name="Source_20_Code"><text:span text:style-name="NormalTok">nord </text:span><text:span text:style-name="OperatorTok">=</text:span><text:span text:style-name="NormalTok"> [</text:span><text:span text:style-name="DecValTok">5</text:span><text:span text:style-name="OperatorTok">,</text:span><text:span text:style-name="NormalTok"> </text:span><text:span text:style-name="DecValTok">5</text:span><text:span text:style-name="OperatorTok">,</text:span><text:span text:style-name="NormalTok"> </text:span><text:span text:style-name="DecValTok">5</text:span><text:span text:style-name="OperatorTok">,</text:span><text:span text:style-name="NormalTok"> </text:span><text:span text:style-name="DecValTok">5</text:span><text:span text:style-name="OperatorTok">,</text:span><text:span text:style-name="NormalTok"> </text:span><text:span text:style-name="DecValTok">5</text:span><text:span text:style-name="OperatorTok">,</text:span><text:span text:style-name="NormalTok"> </text:span><text:span text:style-name="DecValTok">5</text:span><text:span text:style-name="OperatorTok">,</text:span><text:span text:style-name="NormalTok"> </text:span><text:span text:style-name="DecValTok">5</text:span><text:span text:style-name="NormalTok">]</text:span><text:line-break/><text:span text:style-name="NormalTok">sud <text:s/></text:span><text:span text:style-name="OperatorTok">=</text:span><text:span text:style-name="NormalTok"> [</text:span><text:span text:style-name="DecValTok">5</text:span><text:span text:style-name="OperatorTok">,</text:span><text:span text:style-name="NormalTok"> </text:span><text:span text:style-name="DecValTok">5</text:span><text:span text:style-name="OperatorTok">,</text:span><text:span text:style-name="NormalTok"> </text:span><text:span text:style-name="DecValTok">5</text:span><text:span text:style-name="OperatorTok">,</text:span><text:span text:style-name="NormalTok"> </text:span><text:span text:style-name="DecValTok">5</text:span><text:span text:style-name="OperatorTok">,</text:span><text:span text:style-name="NormalTok"> </text:span><text:span text:style-name="DecValTok">5</text:span><text:span text:style-name="OperatorTok">,</text:span><text:span text:style-name="NormalTok"> </text:span><text:span text:style-name="DecValTok">5</text:span><text:span text:style-name="OperatorTok">,</text:span><text:span text:style-name="NormalTok"> </text:span><text:span text:style-name="DecValTok">5</text:span><text:span text:style-name="NormalTok">]</text:span></text:p>
      <text:p text:style-name="First_20_Paragraph">Chaque valeur représente le nombre de graines présentes dans une case.</text:p>
      <text:p text:style-name="Text_20_body">L’indice 0 du tableau correspond à la case numéro 1.<text:line-break/>L’indice 6 du tableau correspond à la case numéro 7.</text:p>
      <text:p text:style-name="Text_20_body">Ainsi :</text:p>
      <text:p text:style-name="Source_20_Code"><text:span text:style-name="NormalTok">Indice 0 → case 1</text:span><text:line-break/><text:span text:style-name="NormalTok">Indice 1 → case 2</text:span><text:line-break/><text:span text:style-name="NormalTok">Indice 2 → case 3</text:span><text:line-break/><text:span text:style-name="NormalTok">Indice 3 → case 4</text:span><text:line-break/><text:span text:style-name="NormalTok">Indice 4 → case 5</text:span><text:line-break/><text:span text:style-name="NormalTok">Indice 5 → case 6</text:span><text:line-break/><text:span text:style-name="NormalTok">Indice 6 → case 7</text:span></text:p>
      <text:p text:style-name="First_20_Paragraph">Cette représentation rend le traitement du plateau plus simple dans le code.</text:p>
      <text:p text:style-name="Standard"><draw:rect text:anchor-type="as-char" style:rel-width="100%" draw:z-index="2" draw:name="Shape3" draw:style-name="gr1" draw:text-style-name="P15" svg:width="6.5004in" svg:height="0.0213in"><text:p/></draw:rect><text:bookmark-end text:name="i.-présentation-générale-du-jeu-du-songo"/><text:bookmark-end text:name="X8ea425005c4c1a678267fdd16c194cccc062a79"/></text:p>
      <text:h text:style-name="Heading_20_1" text:outline-level="1"><text:bookmark-start text:name="ii.-règles-du-jeu-implémentées"/><text:soft-page-break/>II. Règles du jeu implémentées</text:h>
      <text:h text:style-name="Heading_20_2" text:outline-level="2"><text:bookmark-start text:name="règle-du-tour-de-jeu"/>1. Règle du tour de jeu</text:h>
      <text:p text:style-name="First_20_Paragraph">Un joueur ne peut jouer que lorsque c’est son tour. Si le joueur NORD doit jouer, seules les cases du camp NORD sont activées. Si le joueur SUD doit jouer, seules les cases du camp SUD sont activées.</text:p>
      <text:p text:style-name="Text_20_body">Le programme empêche donc un joueur de jouer dans le camp adverse ou de jouer lorsque ce n’est pas son tour.<text:bookmark-end text:name="règle-du-tour-de-jeu"/></text:p>
      <text:h text:style-name="Heading_20_2" text:outline-level="2"><text:bookmark-start text:name="règle-de-la-case-vide"/>2. Règle de la case vide</text:h>
      <text:p text:style-name="First_20_Paragraph">Un joueur ne peut pas jouer une case vide. Si une case contient zéro graine, elle est désactivée et le joueur ne peut pas cliquer dessus.</text:p>
      <text:p text:style-name="Text_20_body">Cette règle évite les coups impossibles.<text:bookmark-end text:name="règle-de-la-case-vide"/></text:p>
      <text:h text:style-name="Heading_20_2" text:outline-level="2"><text:bookmark-start text:name="sens-de-semis"/>3. Sens de semis</text:h>
      <text:p text:style-name="First_20_Paragraph">Le sens de semis appliqué dans le programme est le suivant :</text:p>
      <text:list xml:id="list20106243808891" text:continue-list="list20107608390696" text:style-name="WWNum1003">
        <text:list-item>
          <text:p text:style-name="P3">dans son propre camp, le joueur sème de la case 7 vers la case 1 ;</text:p>
        </text:list-item>
        <text:list-item>
          <text:p text:style-name="P3">lorsqu’il arrive dans le camp adverse, il continue de la case 1 vers la case 7.</text:p>
        </text:list-item>
      </text:list>
      <text:p text:style-name="First_20_Paragraph">Par exemple, pour le joueur SUD, le parcours de semis est :</text:p>
      <text:p text:style-name="Source_20_Code"><text:span text:style-name="NormalTok">SUD7 → SUD6 → SUD5 → SUD4 → SUD3 → SUD2 → SUD1 → NORD1 → NORD2 → NORD3 → NORD4 → NORD5 → NORD6 → NORD7</text:span></text:p>
      <text:p text:style-name="First_20_Paragraph">Pour le joueur NORD, le parcours de semis est :</text:p>
      <text:p text:style-name="Source_20_Code"><text:span text:style-name="NormalTok">NORD7 → NORD6 → NORD5 → NORD4 → NORD3 → NORD2 → NORD1 → SUD1 → SUD2 → SUD3 → SUD4 → SUD5 → SUD6 → SUD7</text:span></text:p>
      <text:p text:style-name="First_20_Paragraph">Si le nombre de graines est supérieur au nombre de cases parcourues, le semis continue en faisant un tour supplémentaire. Cependant, la case de départ est ignorée lorsqu’on revient dessus.<text:bookmark-end text:name="sens-de-semis"/></text:p>
      <text:h text:style-name="Heading_20_2" text:outline-level="2"><text:bookmark-start text:name="règle-de-capture-normale"/>4. Règle de capture normale</text:h>
      <text:p text:style-name="First_20_Paragraph">Une capture est possible lorsque la dernière graine distribuée tombe dans le camp adverse et que la case d’arrivée contient, après le dépôt, exactement :</text:p>
      <text:list xml:id="list20107225624288" text:continue-list="list20106243808891" text:style-name="WWNum1004">
        <text:list-item>
          <text:p text:style-name="P4">2 graines ;</text:p>
        </text:list-item>
        <text:list-item>
          <text:p text:style-name="P4">3 graines ;</text:p>
        </text:list-item>
        <text:list-item>
          <text:p text:style-name="P4">ou 4 graines.</text:p>
        </text:list-item>
      </text:list>
      <text:p text:style-name="First_20_Paragraph"><text:soft-page-break/>Dans ce cas, le joueur capture les graines de cette case. Ces graines sont retirées du plateau et ajoutées au score du joueur.<text:bookmark-end text:name="règle-de-capture-normale"/></text:p>
      <text:h text:style-name="Heading_20_2" text:outline-level="2"><text:bookmark-start text:name="prise-à-la-chaîne"/>5. Prise à la chaîne</text:h>
      <text:p text:style-name="First_20_Paragraph">Après une capture, le programme vérifie les cases précédentes du camp adverse. Si elles contiennent également 2, 3 ou 4 graines, elles sont aussi capturées.</text:p>
      <text:p text:style-name="Text_20_body">Cette prise à la chaîne continue jusqu’à ce qu’une case ne respecte plus la condition de capture ou jusqu’à ce que le parcours sorte du camp adverse.<text:bookmark-end text:name="prise-à-la-chaîne"/></text:p>
      <text:h text:style-name="Heading_20_2" text:outline-level="2"><text:bookmark-start text:name="X47fd1d7e2b47da389a69ad5e8c63d513352788c"/>6. Interdiction de vider complètement le camp adverse</text:h>
      <text:p text:style-name="First_20_Paragraph">Le programme interdit une capture qui aurait pour conséquence de vider entièrement le camp adverse.</text:p>
      <text:p text:style-name="Text_20_body">Si une capture devait retirer toutes les graines restantes du camp adverse, cette capture est annulée. Le coup reste joué, mais les graines ne sont pas capturées.</text:p>
      <text:p text:style-name="Text_20_body">Cette règle permet d’éviter qu’un joueur prive totalement l’autre de possibilité de jeu.<text:bookmark-end text:name="X47fd1d7e2b47da389a69ad5e8c63d513352788c"/></text:p>
      <text:h text:style-name="Heading_20_2" text:outline-level="2"><text:bookmark-start text:name="règle-de-solidarité"/>7. Règle de solidarité</text:h>
      <text:p text:style-name="First_20_Paragraph">Lorsque le camp adverse est vide, le joueur courant doit obligatoirement jouer un coup qui donne des graines à l’adversaire, si cela est possible.</text:p>
      <text:p text:style-name="Text_20_body">Le programme applique les règles suivantes :</text:p>
      <text:list xml:id="list20106754045267" text:continue-list="list20107225624288" text:style-name="WWNum1005">
        <text:list-item>
          <text:p text:style-name="P5">si le joueur peut donner au moins sept graines à l’adversaire, il doit le faire ;</text:p>
        </text:list-item>
        <text:list-item>
          <text:p text:style-name="P5">s’il ne peut pas donner sept graines, il doit donner le maximum possible ;</text:p>
        </text:list-item>
        <text:list-item>
          <text:p text:style-name="P5">si aucun coup ne permet de donner des graines à l’adversaire, la partie se termine.</text:p>
        </text:list-item>
      </text:list>
      <text:p text:style-name="First_20_Paragraph">Cette règle a été intégrée afin de respecter le principe de solidarité du jeu.<text:bookmark-end text:name="règle-de-solidarité"/></text:p>
      <text:h text:style-name="Heading_20_2" text:outline-level="2"><text:bookmark-start text:name="règle-spéciale-de-la-case-7"/>8. Règle spéciale de la case 7</text:h>
      <text:p text:style-name="First_20_Paragraph">Le programme interdit de jouer la case 7 si ce coup permet de semer seulement une ou deux graines dans le camp adverse.</text:p>
      <text:p text:style-name="Text_20_body">Cependant, cette interdiction ne s’applique pas lorsque le coup est imposé par la règle de solidarité. Dans ce cas, la solidarité est prioritaire.<text:bookmark-end text:name="règle-spéciale-de-la-case-7"/></text:p>
      <text:h text:style-name="Heading_20_2" text:outline-level="2"><text:bookmark-start text:name="X697cfadb501c3a1d1acb767c7db1e8036f6ab63"/><text:soft-page-break/>9. Règle spéciale de la case 1 adverse après un tour complet</text:h>
      <text:p text:style-name="First_20_Paragraph">Une règle particulière a été ajoutée dans le projet :</text:p>
      <text:p text:style-name="Text_20_body">Si un joueur termine son semis dans la case numéro 1 adverse après avoir effectué au moins un tour complet, c’est-à-dire avec un nombre de graines comme 14, 21, 28, etc., il ne capture qu’une seule graine : la dernière graine déposée.</text:p>
      <text:p text:style-name="Text_20_body">Par exemple, si SUD joue une case contenant 14 graines et que la dernière graine tombe dans la case 1 de NORD, alors SUD ne capture pas toute la case. Il capture uniquement la dernière graine déposée.</text:p>
      <text:p text:style-name="Text_20_body">Cette règle a été testée dans les deux versions du projet. Le résultat attendu est :</text:p>
      <text:p text:style-name="Source_20_Code"><text:span text:style-name="NormalTok">Score SUD = 1</text:span></text:p>
      <text:p text:style-name="First_20_Paragraph">et la case 1 adverse garde les autres graines déjà présentes.<text:bookmark-end text:name="X697cfadb501c3a1d1acb767c7db1e8036f6ab63"/></text:p>
      <text:h text:style-name="Heading_20_2" text:outline-level="2"><text:bookmark-start text:name="conditions-de-fin-de-partie"/>10. Conditions de fin de partie</text:h>
      <text:p text:style-name="First_20_Paragraph">La partie peut se terminer dans plusieurs cas :</text:p>
      <text:list xml:id="list20107002914290" text:continue-list="list20106754045267" text:style-name="WWNum1006">
        <text:list-item>
          <text:p text:style-name="P6">lorsqu’un joueur atteint au moins 40 graines capturées ;</text:p>
        </text:list-item>
        <text:list-item>
          <text:p text:style-name="P6">lorsqu’il reste moins de 10 graines sur le plateau ;</text:p>
        </text:list-item>
        <text:list-item>
          <text:p text:style-name="P6">lorsqu’un joueur ne peut plus jouer ;</text:p>
        </text:list-item>
        <text:list-item>
          <text:p text:style-name="P6">lorsque la solidarité est impossible.</text:p>
        </text:list-item>
      </text:list>
      <text:p text:style-name="First_20_Paragraph">Lorsque la partie se termine, les graines restantes sur le plateau sont ajoutées aux scores des joueurs concernés, puis le programme détermine le gagnant ou l’égalité.</text:p>
      <text:p text:style-name="Standard"><draw:rect text:anchor-type="as-char" style:rel-width="100%" draw:z-index="3" draw:name="Shape4" draw:style-name="gr1" draw:text-style-name="P15" svg:width="6.5004in" svg:height="0.0213in"><text:p/></draw:rect><text:bookmark-end text:name="ii.-règles-du-jeu-implémentées"/><text:bookmark-end text:name="conditions-de-fin-de-partie"/></text:p>
      <text:h text:style-name="Heading_20_1" text:outline-level="1"><text:bookmark-start text:name="iii.-version-locale"/>III. Version locale</text:h>
      <text:h text:style-name="Heading_20_2" text:outline-level="2"><text:bookmark-start text:name="fonctionnement-de-la-version-locale"/>1. Fonctionnement de la version locale</text:h>
      <text:p text:style-name="First_20_Paragraph">La version locale permet à deux joueurs de jouer sur le même ordinateur et sur la même page web.</text:p>
      <text:p text:style-name="Text_20_body">L’interface affiche :</text:p>
      <text:list xml:id="list20106702352983" text:continue-list="list20107002914290" text:style-name="WWNum1007">
        <text:list-item>
          <text:p text:style-name="P7">le titre du jeu ;</text:p>
        </text:list-item>
        <text:list-item>
          <text:p text:style-name="P7">le score du joueur NORD ;</text:p>
        </text:list-item>
        <text:list-item>
          <text:p text:style-name="P7">le score du joueur SUD ;</text:p>
        </text:list-item>
        <text:list-item>
          <text:p text:style-name="P7"><text:soft-page-break/>le joueur dont c’est le tour ;</text:p>
        </text:list-item>
        <text:list-item>
          <text:p text:style-name="P7">le plateau de jeu ;</text:p>
        </text:list-item>
        <text:list-item>
          <text:p text:style-name="P7">les cases de chaque camp ;</text:p>
        </text:list-item>
        <text:list-item>
          <text:p text:style-name="P7">un message indiquant le dernier coup joué ;</text:p>
        </text:list-item>
        <text:list-item>
          <text:p text:style-name="P7">un bouton permettant de recommencer la partie.</text:p>
        </text:list-item>
      </text:list>
      <text:p text:style-name="First_20_Paragraph">Les cases jouables sont activées automatiquement selon le joueur courant. Les cases de l’autre joueur sont désactivées, ce qui empêche les erreurs de manipulation.<text:bookmark-end text:name="fonctionnement-de-la-version-locale"/></text:p>
      <text:h text:style-name="Heading_20_2" text:outline-level="2"><text:bookmark-start text:name="principe-technique-de-la-version-locale"/>2. Principe technique de la version locale</text:h>
      <text:p text:style-name="First_20_Paragraph">La version locale utilise uniquement :</text:p>
      <text:list xml:id="list20107142759131" text:continue-list="list20106702352983" text:style-name="WWNum1008">
        <text:list-item>
          <text:p text:style-name="P8">HTML ;</text:p>
        </text:list-item>
        <text:list-item>
          <text:p text:style-name="P8">CSS ;</text:p>
        </text:list-item>
        <text:list-item>
          <text:p text:style-name="P8">JavaScript.</text:p>
        </text:list-item>
      </text:list>
      <text:p text:style-name="First_20_Paragraph">Le HTML sert à créer la structure de la page.<text:line-break/>Le CSS sert à mettre en forme le plateau et l’interface.<text:line-break/>Le JavaScript contient toute la logique du jeu.</text:p>
      <text:p text:style-name="Text_20_body">Dans cette version, l’état du jeu est stocké directement dans une variable JavaScript appelée <text:span text:style-name="Verbatim_20_Char">game</text:span>.</text:p>
      <text:p text:style-name="Text_20_body">Cette variable contient :</text:p>
      <text:list xml:id="list20107757880667" text:continue-list="list20107142759131" text:style-name="WWNum1009">
        <text:list-item>
          <text:p text:style-name="P9">les cases du camp NORD ;</text:p>
        </text:list-item>
        <text:list-item>
          <text:p text:style-name="P9">les cases du camp SUD ;</text:p>
        </text:list-item>
        <text:list-item>
          <text:p text:style-name="P9">les scores ;</text:p>
        </text:list-item>
        <text:list-item>
          <text:p text:style-name="P9">le joueur courant ;</text:p>
        </text:list-item>
        <text:list-item>
          <text:p text:style-name="P9">le gagnant ;</text:p>
        </text:list-item>
        <text:list-item>
          <text:p text:style-name="P9">l’état de fin de partie ;</text:p>
        </text:list-item>
        <text:list-item>
          <text:p text:style-name="P9">le message affiché.</text:p>
        </text:list-item>
      </text:list>
      <text:p text:style-name="First_20_Paragraph">Exemple simplifié :</text:p>
      <text:p text:style-name="Source_20_Code"><text:span text:style-name="KeywordTok">let</text:span><text:span text:style-name="NormalTok"> game </text:span><text:span text:style-name="OperatorTok">=</text:span><text:span text:style-name="NormalTok"> {</text:span><text:line-break/><text:span text:style-name="NormalTok"> <text:s text:c="3"/></text:span><text:span text:style-name="DataTypeTok">nord</text:span><text:span text:style-name="OperatorTok">:</text:span><text:span text:style-name="NormalTok"> [</text:span><text:span text:style-name="DecValTok">5</text:span><text:span text:style-name="OperatorTok">,</text:span><text:span text:style-name="NormalTok"> </text:span><text:span text:style-name="DecValTok">5</text:span><text:span text:style-name="OperatorTok">,</text:span><text:span text:style-name="NormalTok"> </text:span><text:span text:style-name="DecValTok">5</text:span><text:span text:style-name="OperatorTok">,</text:span><text:span text:style-name="NormalTok"> </text:span><text:span text:style-name="DecValTok">5</text:span><text:span text:style-name="OperatorTok">,</text:span><text:span text:style-name="NormalTok"> </text:span><text:span text:style-name="DecValTok">5</text:span><text:span text:style-name="OperatorTok">,</text:span><text:span text:style-name="NormalTok"> </text:span><text:span text:style-name="DecValTok">5</text:span><text:span text:style-name="OperatorTok">,</text:span><text:span text:style-name="NormalTok"> </text:span><text:span text:style-name="DecValTok">5</text:span><text:span text:style-name="NormalTok">]</text:span><text:span text:style-name="OperatorTok">,</text:span><text:line-break/><text:span text:style-name="NormalTok"> <text:s text:c="3"/></text:span><text:span text:style-name="DataTypeTok">sud</text:span><text:span text:style-name="OperatorTok">:</text:span><text:span text:style-name="NormalTok"> [</text:span><text:span text:style-name="DecValTok">5</text:span><text:span text:style-name="OperatorTok">,</text:span><text:span text:style-name="NormalTok"> </text:span><text:span text:style-name="DecValTok">5</text:span><text:span text:style-name="OperatorTok">,</text:span><text:span text:style-name="NormalTok"> </text:span><text:span text:style-name="DecValTok">5</text:span><text:span text:style-name="OperatorTok">,</text:span><text:span text:style-name="NormalTok"> </text:span><text:span text:style-name="DecValTok">5</text:span><text:span text:style-name="OperatorTok">,</text:span><text:span text:style-name="NormalTok"> </text:span><text:span text:style-name="DecValTok">5</text:span><text:span text:style-name="OperatorTok">,</text:span><text:span text:style-name="NormalTok"> </text:span><text:span text:style-name="DecValTok">5</text:span><text:span text:style-name="OperatorTok">,</text:span><text:span text:style-name="NormalTok"> </text:span><text:span text:style-name="DecValTok">5</text:span><text:span text:style-name="NormalTok">]</text:span><text:span text:style-name="OperatorTok">,</text:span><text:line-break/><text:span text:style-name="NormalTok"> <text:s text:c="3"/></text:span><text:span text:style-name="DataTypeTok">scoreNord</text:span><text:span text:style-name="OperatorTok">:</text:span><text:span text:style-name="NormalTok"> </text:span><text:span text:style-name="DecValTok">0</text:span><text:span text:style-name="OperatorTok">,</text:span><text:line-break/><text:span text:style-name="NormalTok"> <text:s text:c="3"/></text:span><text:span text:style-name="DataTypeTok">scoreSud</text:span><text:span text:style-name="OperatorTok">:</text:span><text:span text:style-name="NormalTok"> </text:span><text:span text:style-name="DecValTok">0</text:span><text:span text:style-name="OperatorTok">,</text:span><text:line-break/><text:span text:style-name="NormalTok"> <text:s text:c="3"/></text:span><text:span text:style-name="DataTypeTok">currentPlayer</text:span><text:span text:style-name="OperatorTok">:</text:span><text:span text:style-name="NormalTok"> </text:span><text:span text:style-name="StringTok">"SUD"</text:span><text:span text:style-name="OperatorTok">,</text:span><text:line-break/><text:span text:style-name="NormalTok"> <text:s text:c="3"/></text:span><text:span text:style-name="DataTypeTok">winner</text:span><text:span text:style-name="OperatorTok">:</text:span><text:span text:style-name="NormalTok"> </text:span><text:span text:style-name="KeywordTok">null</text:span><text:span text:style-name="OperatorTok">,</text:span><text:line-break/><text:span text:style-name="NormalTok"> <text:s text:c="3"/></text:span><text:span text:style-name="DataTypeTok">gameOver</text:span><text:span text:style-name="OperatorTok">:</text:span><text:span text:style-name="NormalTok"> </text:span><text:span text:style-name="KeywordTok">false</text:span><text:line-break/><text:span text:style-name="NormalTok">}</text:span><text:span text:style-name="OperatorTok">;</text:span><text:bookmark-end text:name="principe-technique-de-la-version-locale"/></text:p>
      <text:h text:style-name="Heading_20_2" text:outline-level="2"><text:bookmark-start text:name="Xda6ec9737d3975768b792bd995af6a7adf021b1"/><text:soft-page-break/>3. Organisation du code de la version locale</text:h>
      <text:p text:style-name="First_20_Paragraph">La version locale est contenue dans le dossier :</text:p>
      <text:p text:style-name="Source_20_Code"><text:span text:style-name="NormalTok">songo-local/</text:span></text:p>
      <text:p text:style-name="First_20_Paragraph">Elle est organisée comme suit :</text:p>
      <text:p text:style-name="Source_20_Code"><text:span text:style-name="NormalTok">songo-local/</text:span><text:line-break/><text:span text:style-name="NormalTok">├── index.html</text:span><text:line-break/><text:span text:style-name="NormalTok">├── style.css</text:span><text:line-break/><text:span text:style-name="NormalTok">└── script.js</text:span></text:p>
      <text:h text:style-name="Heading_20_3" text:outline-level="3"><text:bookmark-start text:name="rôle-des-fichiers"/>Rôle des fichiers</text:h>
      <text:p text:style-name="First_20_Paragraph">Le fichier <text:span text:style-name="Verbatim_20_Char">index.html</text:span> contient la structure de la page web. Il contient les zones d’affichage du score, du plateau, des messages et du bouton de nouvelle partie.</text:p>
      <text:p text:style-name="Text_20_body">Le fichier <text:span text:style-name="Verbatim_20_Char">style.css</text:span> contient la mise en forme graphique. Il définit les couleurs, les dimensions du plateau, l’apparence des cases, les cartes de score et les boutons.</text:p>
      <text:p text:style-name="Text_20_body">Le fichier <text:span text:style-name="Verbatim_20_Char">script.js</text:span> contient toute la logique du jeu. Il gère l’initialisation, le tirage au sort du premier joueur, le semis, les captures, la solidarité, les interdictions et les conditions de fin de partie.<text:bookmark-end text:name="Xda6ec9737d3975768b792bd995af6a7adf021b1"/><text:bookmark-end text:name="rôle-des-fichiers"/></text:p>
      <text:h text:style-name="Heading_20_2" text:outline-level="2"><text:bookmark-start text:name="algorithme-de-la-version-locale"/>4. Algorithme de la version locale</text:h>
      <text:p text:style-name="First_20_Paragraph">L’algorithme général de la version locale peut être résumé ainsi :</text:p>
      <text:p text:style-name="Source_20_Code"><text:span text:style-name="NormalTok">Début</text:span><text:line-break/><text:line-break/><text:span text:style-name="NormalTok">Initialiser les deux camps avec 7 cases contenant 5 graines chacune.</text:span><text:line-break/><text:span text:style-name="NormalTok">Initialiser les scores à 0.</text:span><text:line-break/><text:span text:style-name="NormalTok">Choisir aléatoirement le premier joueur.</text:span><text:line-break/><text:span text:style-name="NormalTok">Afficher le plateau.</text:span><text:line-break/><text:line-break/><text:span text:style-name="NormalTok">Tant que la partie n’est pas terminée :</text:span><text:line-break/><text:line-break/><text:span text:style-name="NormalTok"> <text:s text:c="3"/>Le joueur courant choisit une case de son camp.</text:span><text:line-break/><text:line-break/><text:span text:style-name="NormalTok"> <text:s text:c="3"/>Vérifier que la case n’est pas vide.</text:span><text:line-break/><text:span text:style-name="NormalTok"> <text:s text:c="3"/>Vérifier que c’est bien le tour du joueur.</text:span><text:line-break/><text:span text:style-name="NormalTok"> <text:s text:c="3"/>Vérifier les règles de solidarité.</text:span><text:line-break/><text:span text:style-name="NormalTok"> <text:s text:c="3"/>Vérifier la règle spéciale de la case 7.</text:span><text:line-break/><text:line-break/><text:span text:style-name="NormalTok"> <text:s text:c="3"/>Si le coup est invalide :</text:span><text:line-break/><text:span text:style-name="NormalTok"> <text:s text:c="7"/>afficher un message d’erreur.</text:span><text:line-break/><text:line-break/><text:soft-page-break/><text:span text:style-name="NormalTok"> <text:s text:c="3"/>Sinon :</text:span><text:line-break/><text:span text:style-name="NormalTok"> <text:s text:c="7"/>mémoriser le nombre de graines jouées.</text:span><text:line-break/><text:span text:style-name="NormalTok"> <text:s text:c="7"/>vider la case choisie.</text:span><text:line-break/><text:span text:style-name="NormalTok"> <text:s text:c="7"/>semer les graines une par une selon le parcours.</text:span><text:line-break/><text:span text:style-name="NormalTok"> <text:s text:c="7"/>identifier la dernière case atteinte.</text:span><text:line-break/><text:line-break/><text:span text:style-name="NormalTok"> <text:s text:c="7"/>Si la dernière case est dans le camp adverse :</text:span><text:line-break/><text:span text:style-name="NormalTok"> <text:s text:c="11"/>vérifier les règles de capture.</text:span><text:line-break/><text:span text:style-name="NormalTok"> <text:s text:c="11"/>appliquer la capture normale si possible.</text:span><text:line-break/><text:span text:style-name="NormalTok"> <text:s text:c="11"/>appliquer la prise à la chaîne si possible.</text:span><text:line-break/><text:span text:style-name="NormalTok"> <text:s text:c="11"/>appliquer la règle spéciale de la case 1 adverse après un tour complet si nécessaire.</text:span><text:line-break/><text:line-break/><text:span text:style-name="NormalTok"> <text:s text:c="7"/>Mettre à jour le score.</text:span><text:line-break/><text:span text:style-name="NormalTok"> <text:s text:c="7"/>Vérifier les conditions de fin de partie.</text:span><text:line-break/><text:line-break/><text:span text:style-name="NormalTok"> <text:s text:c="7"/>Si la partie n’est pas terminée :</text:span><text:line-break/><text:span text:style-name="NormalTok"> <text:s text:c="11"/>passer le tour à l’autre joueur.</text:span><text:line-break/><text:line-break/><text:span text:style-name="NormalTok"> <text:s text:c="3"/>Afficher le nouvel état du jeu.</text:span><text:line-break/><text:line-break/><text:span text:style-name="NormalTok">Fin Tant que</text:span><text:line-break/><text:line-break/><text:span text:style-name="NormalTok">Afficher le gagnant ou l’égalité.</text:span><text:line-break/><text:line-break/><text:span text:style-name="NormalTok">Fin</text:span></text:p>
      <text:p text:style-name="Standard"><draw:rect text:anchor-type="as-char" style:rel-width="100%" draw:z-index="4" draw:name="Shape5" draw:style-name="gr1" draw:text-style-name="P15" svg:width="6.5004in" svg:height="0.0213in"><text:p/></draw:rect><text:bookmark-end text:name="iii.-version-locale"/><text:bookmark-end text:name="algorithme-de-la-version-locale"/></text:p>
      <text:h text:style-name="Heading_20_1" text:outline-level="1"><text:bookmark-start text:name="iv.-version-distante"/>IV. Version distante</text:h>
      <text:h text:style-name="Heading_20_2" text:outline-level="2"><text:bookmark-start text:name="fonctionnement-de-la-version-distante"/>1. Fonctionnement de la version distante</text:h>
      <text:p text:style-name="First_20_Paragraph">La version distante permet à deux joueurs de jouer depuis deux navigateurs différents.</text:p>
      <text:p text:style-name="Text_20_body">Chaque joueur choisit son camp dans l’interface :</text:p>
      <text:list xml:id="list20107141231106" text:continue-list="list20107757880667" text:style-name="WWNum1010">
        <text:list-item>
          <text:p text:style-name="P10">SUD ;</text:p>
        </text:list-item>
        <text:list-item>
          <text:p text:style-name="P10">NORD.</text:p>
        </text:list-item>
      </text:list>
      <text:p text:style-name="First_20_Paragraph">Lorsqu’un joueur joue un coup, les informations du coup sont envoyées au serveur. Le serveur applique les règles du jeu, met à jour la base de données, puis renvoie le nouvel état du jeu au navigateur.</text:p>
      <text:p text:style-name="Text_20_body">Cette version permet donc de séparer :</text:p>
      <text:list xml:id="list20106759869940" text:continue-list="list20107141231106" text:style-name="WWNum1011">
        <text:list-item>
          <text:p text:style-name="P11">l’interface utilisateur côté navigateur ;</text:p>
        </text:list-item>
        <text:list-item>
          <text:p text:style-name="P11">le traitement des règles côté serveur ;</text:p>
        </text:list-item>
        <text:list-item>
          <text:p text:style-name="P11"><text:soft-page-break/>le stockage de la partie dans une base de données.<text:bookmark-end text:name="fonctionnement-de-la-version-distante"/></text:p>
        </text:list-item>
      </text:list>
      <text:h text:style-name="Heading_20_2" text:outline-level="2"><text:bookmark-start text:name="X71fef1fc001c81a0801b410183c824a85e0f05f"/>2. Principe technique de la version distante</text:h>
      <text:p text:style-name="First_20_Paragraph">La version distante utilise les technologies suivantes :</text:p>
      <text:list xml:id="list20106095774128" text:continue-list="list20106759869940" text:style-name="WWNum1012">
        <text:list-item>
          <text:p text:style-name="P12">HTML pour la structure de la page ;</text:p>
        </text:list-item>
        <text:list-item>
          <text:p text:style-name="P12">CSS pour l’apparence ;</text:p>
        </text:list-item>
        <text:list-item>
          <text:p text:style-name="P12">JavaScript pour les interactions côté client ;</text:p>
        </text:list-item>
        <text:list-item>
          <text:p text:style-name="P12">Ajax avec <text:span text:style-name="Verbatim_20_Char">fetch()</text:span> pour communiquer avec le serveur ;</text:p>
        </text:list-item>
        <text:list-item>
          <text:p text:style-name="P12">PHP pour traiter les coups ;</text:p>
        </text:list-item>
        <text:list-item>
          <text:p text:style-name="P12">MySQL pour stocker l’état de la partie.</text:p>
        </text:list-item>
      </text:list>
      <text:p text:style-name="First_20_Paragraph">Le fonctionnement général est le suivant :</text:p>
      <text:p text:style-name="Source_20_Code"><text:span text:style-name="NormalTok">Navigateur du joueur</text:span><text:line-break/><text:span text:style-name="NormalTok"> <text:s text:c="7"/>↓ requête Ajax</text:span><text:line-break/><text:span text:style-name="NormalTok">Fichier PHP</text:span><text:line-break/><text:span text:style-name="NormalTok"> <text:s text:c="7"/>↓ traitement des règles</text:span><text:line-break/><text:span text:style-name="NormalTok">Base de données MySQL</text:span><text:line-break/><text:span text:style-name="NormalTok"> <text:s text:c="7"/>↓ nouvel état du jeu</text:span><text:line-break/><text:span text:style-name="NormalTok">Fichier PHP</text:span><text:line-break/><text:span text:style-name="NormalTok"> <text:s text:c="7"/>↓ réponse JSON</text:span><text:line-break/><text:span text:style-name="NormalTok">Navigateur du joueur</text:span></text:p>
      <text:p text:style-name="First_20_Paragraph">Le navigateur n’a donc pas besoin de recharger toute la page après chaque coup. Il envoie simplement une requête au serveur et met à jour l’affichage avec la réponse reçue.<text:bookmark-end text:name="X71fef1fc001c81a0801b410183c824a85e0f05f"/></text:p>
      <text:h text:style-name="Heading_20_2" text:outline-level="2"><text:bookmark-start text:name="Xaac03e6a59ec0518fa37232a3a338708f1e18ae"/>3. Organisation du code de la version distante</text:h>
      <text:p text:style-name="First_20_Paragraph">La version distante est contenue dans le dossier :</text:p>
      <text:p text:style-name="Source_20_Code"><text:span text:style-name="NormalTok">songo-distant/</text:span></text:p>
      <text:p text:style-name="First_20_Paragraph">Elle est organisée comme suit :</text:p>
      <text:p text:style-name="Source_20_Code"><text:span text:style-name="NormalTok">songo-distant/</text:span><text:line-break/><text:span text:style-name="NormalTok">├── api/</text:span><text:line-break/><text:span text:style-name="NormalTok">│ <text:s text:c="2"/>├── db.php</text:span><text:line-break/><text:span text:style-name="NormalTok">│ <text:s text:c="2"/>├── get_state.php</text:span><text:line-break/><text:span text:style-name="NormalTok">│ <text:s text:c="2"/>├── play.php</text:span><text:line-break/><text:span text:style-name="NormalTok">│ <text:s text:c="2"/>└── reset.php</text:span><text:line-break/><text:span text:style-name="NormalTok">├── database/</text:span><text:line-break/><text:span text:style-name="NormalTok">│ <text:s text:c="2"/>└── init.sql</text:span><text:line-break/><text:span text:style-name="NormalTok">├── index.html</text:span><text:line-break/><text:span text:style-name="NormalTok">├── style.css</text:span><text:line-break/><text:span text:style-name="NormalTok">├── app.js</text:span><text:line-break/><text:span text:style-name="NormalTok">└── README.txt</text:span></text:p>
      <text:h text:style-name="Heading_20_3" text:outline-level="3"><text:bookmark-start text:name="rôle-des-fichiers-1"/><text:soft-page-break/>Rôle des fichiers</text:h>
      <text:p text:style-name="First_20_Paragraph">Le fichier <text:span text:style-name="Verbatim_20_Char">index.html</text:span> contient l’interface de la version distante.</text:p>
      <text:p text:style-name="Text_20_body">Le fichier <text:span text:style-name="Verbatim_20_Char">style.css</text:span> contient la mise en forme graphique de l’interface.</text:p>
      <text:p text:style-name="Text_20_body">Le fichier <text:span text:style-name="Verbatim_20_Char">app.js</text:span> contient le code JavaScript côté client. Il permet de récupérer l’état de la partie, d’afficher le plateau, d’envoyer un coup au serveur et de réinitialiser la partie.</text:p>
      <text:p text:style-name="Text_20_body">Le fichier <text:span text:style-name="Verbatim_20_Char">api/db.php</text:span> contient la connexion à la base de données MySQL.</text:p>
      <text:p text:style-name="Text_20_body">Le fichier <text:span text:style-name="Verbatim_20_Char">api/get_state.php</text:span> récupère l’état actuel de la partie depuis MySQL et le renvoie au navigateur.</text:p>
      <text:p text:style-name="Text_20_body">Le fichier <text:span text:style-name="Verbatim_20_Char">api/play.php</text:span> reçoit le coup joué, vérifie sa validité, applique les règles du Songo, met à jour la base de données et renvoie le nouvel état du jeu.</text:p>
      <text:p text:style-name="Text_20_body">Le fichier <text:span text:style-name="Verbatim_20_Char">api/reset.php</text:span> permet de réinitialiser la partie.</text:p>
      <text:p text:style-name="Text_20_body">Le fichier <text:span text:style-name="Verbatim_20_Char">database/init.sql</text:span> permet de créer la base de données et la table nécessaires au projet.<text:bookmark-end text:name="Xaac03e6a59ec0518fa37232a3a338708f1e18ae"/><text:bookmark-end text:name="rôle-des-fichiers-1"/></text:p>
      <text:h text:style-name="Heading_20_2" text:outline-level="2"><text:bookmark-start text:name="base-de-données-utilisée"/>4. Base de données utilisée</text:h>
      <text:p text:style-name="First_20_Paragraph">La base de données utilisée est :</text:p>
      <text:p text:style-name="Source_20_Code"><text:span text:style-name="NormalTok">songo_db</text:span></text:p>
      <text:p text:style-name="First_20_Paragraph">Elle contient une table principale appelée :</text:p>
      <text:p text:style-name="Source_20_Code"><text:span text:style-name="NormalTok">games</text:span></text:p>
      <text:p text:style-name="First_20_Paragraph">Cette table stocke les informations suivantes :</text:p>
      <text:list xml:id="list20106729207282" text:continue-list="list20106095774128" text:style-name="WWNum1013">
        <text:list-item>
          <text:p text:style-name="P13">les cases du camp NORD ;</text:p>
        </text:list-item>
        <text:list-item>
          <text:p text:style-name="P13">les cases du camp SUD ;</text:p>
        </text:list-item>
        <text:list-item>
          <text:p text:style-name="P13">le score de NORD ;</text:p>
        </text:list-item>
        <text:list-item>
          <text:p text:style-name="P13">le score de SUD ;</text:p>
        </text:list-item>
        <text:list-item>
          <text:p text:style-name="P13">le joueur courant ;</text:p>
        </text:list-item>
        <text:list-item>
          <text:p text:style-name="P13">le gagnant ;</text:p>
        </text:list-item>
        <text:list-item>
          <text:p text:style-name="P13">l’état de fin de partie ;</text:p>
        </text:list-item>
        <text:list-item>
          <text:p text:style-name="P13">le message affiché.</text:p>
        </text:list-item>
      </text:list>
      <text:p text:style-name="First_20_Paragraph">Les cases des deux camps sont stockées sous forme de tableaux JSON.</text:p>
      <text:p text:style-name="Text_20_body">Exemple :</text:p>
      <text:p text:style-name="Source_20_Code"><text:span text:style-name="OtherTok">[</text:span><text:span text:style-name="DecValTok">5</text:span><text:span text:style-name="OtherTok">,</text:span><text:span text:style-name="DecValTok">5</text:span><text:span text:style-name="OtherTok">,</text:span><text:span text:style-name="DecValTok">5</text:span><text:span text:style-name="OtherTok">,</text:span><text:span text:style-name="DecValTok">5</text:span><text:span text:style-name="OtherTok">,</text:span><text:span text:style-name="DecValTok">5</text:span><text:span text:style-name="OtherTok">,</text:span><text:span text:style-name="DecValTok">5</text:span><text:span text:style-name="OtherTok">,</text:span><text:span text:style-name="DecValTok">5</text:span><text:span text:style-name="OtherTok">]</text:span></text:p>
      <text:p text:style-name="First_20_Paragraph"><text:soft-page-break/>Ce choix permet de stocker simplement les sept cases d’un camp dans un seul champ de la base de données.<text:bookmark-end text:name="base-de-données-utilisée"/></text:p>
      <text:h text:style-name="Heading_20_2" text:outline-level="2"><text:bookmark-start text:name="algorithme-de-la-version-distante"/>5. Algorithme de la version distante</text:h>
      <text:p text:style-name="First_20_Paragraph">L’algorithme de la version distante peut être résumé ainsi :</text:p>
      <text:p text:style-name="Source_20_Code"><text:span text:style-name="NormalTok">Début</text:span><text:line-break/><text:line-break/><text:span text:style-name="NormalTok">Le navigateur demande l’état actuel du jeu au serveur.</text:span><text:line-break/><text:span text:style-name="NormalTok">Le serveur lit les données dans MySQL.</text:span><text:line-break/><text:span text:style-name="NormalTok">Le serveur renvoie l’état du jeu au format JSON.</text:span><text:line-break/><text:span text:style-name="NormalTok">Le navigateur affiche le plateau.</text:span><text:line-break/><text:line-break/><text:span text:style-name="NormalTok">Lorsqu’un joueur clique sur une case :</text:span><text:line-break/><text:line-break/><text:span text:style-name="NormalTok"> <text:s text:c="3"/>Le navigateur envoie au serveur :</text:span><text:line-break/><text:span text:style-name="NormalTok"> <text:s text:c="7"/>- le joueur ;</text:span><text:line-break/><text:span text:style-name="NormalTok"> <text:s text:c="7"/>- l’indice de la case jouée.</text:span><text:line-break/><text:line-break/><text:span text:style-name="NormalTok"> <text:s text:c="3"/>Le serveur récupère l’état actuel de la partie dans MySQL.</text:span><text:line-break/><text:line-break/><text:span text:style-name="NormalTok"> <text:s text:c="3"/>Le serveur vérifie :</text:span><text:line-break/><text:span text:style-name="NormalTok"> <text:s text:c="7"/>- que la partie n’est pas terminée ;</text:span><text:line-break/><text:span text:style-name="NormalTok"> <text:s text:c="7"/>- que c’est bien le tour du joueur ;</text:span><text:line-break/><text:span text:style-name="NormalTok"> <text:s text:c="7"/>- que la case choisie existe ;</text:span><text:line-break/><text:span text:style-name="NormalTok"> <text:s text:c="7"/>- que la case appartient au joueur ;</text:span><text:line-break/><text:span text:style-name="NormalTok"> <text:s text:c="7"/>- que la case n’est pas vide ;</text:span><text:line-break/><text:span text:style-name="NormalTok"> <text:s text:c="7"/>- que la règle de solidarité est respectée ;</text:span><text:line-break/><text:span text:style-name="NormalTok"> <text:s text:c="7"/>- que la règle spéciale de la case 7 est respectée.</text:span><text:line-break/><text:line-break/><text:span text:style-name="NormalTok"> <text:s text:c="3"/>Si le coup est invalide :</text:span><text:line-break/><text:span text:style-name="NormalTok"> <text:s text:c="7"/>le serveur renvoie un message d’erreur.</text:span><text:line-break/><text:line-break/><text:span text:style-name="NormalTok"> <text:s text:c="3"/>Sinon :</text:span><text:line-break/><text:span text:style-name="NormalTok"> <text:s text:c="7"/>le serveur mémorise le nombre de graines jouées.</text:span><text:line-break/><text:span text:style-name="NormalTok"> <text:s text:c="7"/>le serveur applique le semis.</text:span><text:line-break/><text:span text:style-name="NormalTok"> <text:s text:c="7"/>le serveur identifie la dernière case atteinte.</text:span><text:line-break/><text:span text:style-name="NormalTok"> <text:s text:c="7"/>le serveur applique les règles de capture.</text:span><text:line-break/><text:span text:style-name="NormalTok"> <text:s text:c="7"/>le serveur applique la règle spéciale de la case 1 adverse après un tour complet si nécessaire.</text:span><text:line-break/><text:span text:style-name="NormalTok"> <text:s text:c="7"/>le serveur met à jour les scores.</text:span><text:line-break/><text:span text:style-name="NormalTok"> <text:s text:c="7"/>le serveur vérifie les conditions de fin de partie.</text:span><text:line-break/><text:span text:style-name="NormalTok"> <text:s text:c="7"/>le serveur sauvegarde le nouvel état dans MySQL.</text:span><text:line-break/><text:span text:style-name="NormalTok"> <text:s text:c="7"/>le serveur renvoie le nouvel état au navigateur.</text:span><text:line-break/><text:line-break/><text:span text:style-name="NormalTok"> <text:s text:c="3"/>Le navigateur met à jour l’affichage.</text:span><text:line-break/><text:line-break/><text:span text:style-name="NormalTok">Fin</text:span></text:p>
      <text:p text:style-name="Standard"><text:soft-page-break/><draw:rect text:anchor-type="as-char" style:rel-width="100%" draw:z-index="5" draw:name="Shape6" draw:style-name="gr1" draw:text-style-name="P15" svg:width="6.5004in" svg:height="0.0213in"><text:p/></draw:rect><text:bookmark-end text:name="iv.-version-distante"/><text:bookmark-end text:name="algorithme-de-la-version-distante"/></text:p>
      <text:h text:style-name="Heading_20_1" text:outline-level="1"><text:bookmark-start text:name="v.-environnement-de-développement"/>V. Environnement de développement</text:h>
      <text:h text:style-name="Heading_20_2" text:outline-level="2"><text:bookmark-start text:name="serveur-local"/>1. Serveur local</text:h>
      <text:p text:style-name="First_20_Paragraph">Le projet a été exécuté sur un serveur local. L’environnement utilisé est composé de :</text:p>
      <text:list xml:id="list20106041571734" text:continue-list="list20106729207282" text:style-name="WWNum1014">
        <text:list-item>
          <text:p text:style-name="P14">Apache ;</text:p>
        </text:list-item>
        <text:list-item>
          <text:p text:style-name="P14">PHP ;</text:p>
        </text:list-item>
        <text:list-item>
          <text:p text:style-name="P14">MySQL.</text:p>
        </text:list-item>
      </text:list>
      <text:p text:style-name="First_20_Paragraph">Le dossier web utilisé par Apache est :</text:p>
      <text:p text:style-name="Source_20_Code"><text:span text:style-name="NormalTok">/var/www/html</text:span></text:p>
      <text:p text:style-name="First_20_Paragraph">Les deux versions du projet ont été placées dans ce dossier :</text:p>
      <text:p text:style-name="Source_20_Code"><text:span text:style-name="NormalTok">/var/www/html/songo-local</text:span><text:line-break/><text:span text:style-name="NormalTok">/var/www/html/songo-distant</text:span><text:bookmark-end text:name="serveur-local"/></text:p>
      <text:h text:style-name="Heading_20_2" text:outline-level="2"><text:bookmark-start text:name="lancement-de-la-version-locale"/>2. Lancement de la version locale</text:h>
      <text:p text:style-name="First_20_Paragraph">Pour lancer la version locale, il faut démarrer Apache :</text:p>
      <text:p text:style-name="Source_20_Code"><text:span text:style-name="FunctionTok">sudo</text:span><text:span text:style-name="NormalTok"> systemctl start apache2</text:span></text:p>
      <text:p text:style-name="First_20_Paragraph">Puis ouvrir dans le navigateur :</text:p>
      <text:p text:style-name="Source_20_Code"><text:span text:style-name="NormalTok">http://localhost/songo-local/</text:span></text:p>
      <text:p text:style-name="First_20_Paragraph">La version locale ne nécessite pas de base de données.<text:bookmark-end text:name="lancement-de-la-version-locale"/></text:p>
      <text:h text:style-name="Heading_20_2" text:outline-level="2"><text:bookmark-start text:name="lancement-de-la-version-distante"/>3. Lancement de la version distante</text:h>
      <text:p text:style-name="First_20_Paragraph">Pour lancer la version distante, il faut démarrer Apache et MySQL :</text:p>
      <text:p text:style-name="Source_20_Code"><text:span text:style-name="FunctionTok">sudo</text:span><text:span text:style-name="NormalTok"> systemctl start apache2</text:span><text:line-break/><text:span text:style-name="FunctionTok">sudo</text:span><text:span text:style-name="NormalTok"> systemctl start mysql</text:span></text:p>
      <text:p text:style-name="First_20_Paragraph">Ensuite, il faut importer la base de données :</text:p>
      <text:p text:style-name="Source_20_Code"><text:span text:style-name="BuiltInTok">cd</text:span><text:span text:style-name="NormalTok"> /var/www/html/songo-distant</text:span><text:line-break/><text:span text:style-name="FunctionTok">sudo</text:span><text:span text:style-name="NormalTok"> mysql </text:span><text:span text:style-name="OperatorTok">&lt;</text:span><text:span text:style-name="NormalTok"> database/init.sql</text:span></text:p>
      <text:p text:style-name="First_20_Paragraph">Puis ouvrir dans le navigateur :</text:p>
      <text:p text:style-name="Source_20_Code"><text:span text:style-name="NormalTok">http://localhost/songo-distant/</text:span></text:p>
      <text:p text:style-name="First_20_Paragraph">Pour simuler deux joueurs, on peut ouvrir deux onglets du navigateur : un onglet pour le joueur SUD et un autre pour le joueur NORD.</text:p>
      <text:p text:style-name="Standard"><text:soft-page-break/><draw:rect text:anchor-type="as-char" style:rel-width="100%" draw:z-index="6" draw:name="Shape7" draw:style-name="gr1" draw:text-style-name="P15" svg:width="6.5004in" svg:height="0.0213in"><text:p/></draw:rect><text:bookmark-end text:name="v.-environnement-de-développement"/><text:bookmark-end text:name="lancement-de-la-version-distante"/></text:p>
      <text:h text:style-name="Heading_20_1" text:outline-level="1"><text:bookmark-start text:name="vi.-tests-réalisés"/>VI. Tests réalisés</text:h>
      <text:h text:style-name="Heading_20_2" text:outline-level="2"><text:bookmark-start text:name="test-du-plateau-initial"/>1. Test du plateau initial</text:h>
      <text:p text:style-name="First_20_Paragraph">Au lancement de la partie, chaque camp contient sept cases et chaque case contient cinq graines. Les scores sont à zéro.<text:bookmark-end text:name="test-du-plateau-initial"/></text:p>
      <text:h text:style-name="Heading_20_2" text:outline-level="2"><text:bookmark-start text:name="test-du-tirage-au-sort"/>2. Test du tirage au sort</text:h>
      <text:p text:style-name="First_20_Paragraph">Le premier joueur est choisi aléatoirement entre NORD et SUD.<text:bookmark-end text:name="test-du-tirage-au-sort"/></text:p>
      <text:h text:style-name="Heading_20_2" text:outline-level="2"><text:bookmark-start text:name="test-du-semis"/>3. Test du semis</text:h>
      <text:p text:style-name="First_20_Paragraph">Lorsqu’un joueur joue une case, cette case est vidée et les graines sont distribuées une par une selon le sens de semis prévu.<text:bookmark-end text:name="test-du-semis"/></text:p>
      <text:h text:style-name="Heading_20_2" text:outline-level="2"><text:bookmark-start text:name="test-du-tour-de-jeu"/>4. Test du tour de jeu</text:h>
      <text:p text:style-name="First_20_Paragraph">Le programme empêche un joueur de jouer lorsque ce n’est pas son tour.<text:bookmark-end text:name="test-du-tour-de-jeu"/></text:p>
      <text:h text:style-name="Heading_20_2" text:outline-level="2"><text:bookmark-start text:name="test-de-la-capture-normale"/>5. Test de la capture normale</text:h>
      <text:p text:style-name="First_20_Paragraph">Le programme capture les graines lorsque la dernière graine tombe dans le camp adverse et que la case contient 2, 3 ou 4 graines.<text:bookmark-end text:name="test-de-la-capture-normale"/></text:p>
      <text:h text:style-name="Heading_20_2" text:outline-level="2"><text:bookmark-start text:name="test-de-la-prise-à-la-chaîne"/>6. Test de la prise à la chaîne</text:h>
      <text:p text:style-name="First_20_Paragraph">Le programme capture plusieurs cases adverses successives si elles respectent les conditions de capture.<text:bookmark-end text:name="test-de-la-prise-à-la-chaîne"/></text:p>
      <text:h text:style-name="Heading_20_2" text:outline-level="2"><text:bookmark-start text:name="Xc63968c03dfc324ccf9b7065ef22b0692fdac76"/>7. Test de l’interdiction de vider le camp adverse</text:h>
      <text:p text:style-name="First_20_Paragraph">Lorsqu’une capture devait vider totalement le camp adverse, la capture a été annulée.<text:bookmark-end text:name="Xc63968c03dfc324ccf9b7065ef22b0692fdac76"/></text:p>
      <text:h text:style-name="Heading_20_2" text:outline-level="2"><text:bookmark-start text:name="test-de-la-règle-de-solidarité"/>8. Test de la règle de solidarité</text:h>
      <text:p text:style-name="First_20_Paragraph">Lorsque le camp adverse était vide, le programme a obligé le joueur à donner des graines à l’adversaire si cela était possible.<text:bookmark-end text:name="test-de-la-règle-de-solidarité"/></text:p>
      <text:h text:style-name="Heading_20_2" text:outline-level="2"><text:bookmark-start text:name="test-de-la-case-7"/>9. Test de la case 7</text:h>
      <text:p text:style-name="First_20_Paragraph">Le programme a empêché un joueur de semer seulement une ou deux graines chez l’adversaire à partir de la case 7, sauf dans un cas de solidarité.<text:bookmark-end text:name="test-de-la-case-7"/></text:p>
      <text:h text:style-name="Heading_20_2" text:outline-level="2"><text:bookmark-start text:name="X3d8208b476d890e041f904af29e0c91a6b96c2a"/><text:soft-page-break/>10. Test de la règle spéciale de la case 1 adverse</text:h>
      <text:p text:style-name="First_20_Paragraph">Un test a été réalisé avec la configuration suivante :</text:p>
      <text:p text:style-name="Source_20_Code"><text:span text:style-name="NormalTok">SUD = [14,0,0,0,0,0,0]</text:span><text:line-break/><text:span text:style-name="NormalTok">NORD = [0,0,0,0,0,0,0]</text:span><text:line-break/><text:span text:style-name="NormalTok">Score SUD = 0</text:span><text:line-break/><text:span text:style-name="NormalTok">Score NORD = 0</text:span><text:line-break/><text:span text:style-name="NormalTok">Joueur courant = SUD</text:span></text:p>
      <text:p text:style-name="First_20_Paragraph">Après avoir joué la case 1 de SUD, le résultat obtenu est :</text:p>
      <text:p text:style-name="Source_20_Code"><text:span text:style-name="NormalTok">Score SUD = 1</text:span><text:line-break/><text:span text:style-name="NormalTok">NORD = [1,1,1,1,1,1,1]</text:span><text:line-break/><text:span text:style-name="NormalTok">SUD = [0,1,1,1,1,1,1]</text:span></text:p>
      <text:p text:style-name="First_20_Paragraph">Ce test confirme que la règle spéciale de la case 1 adverse après un tour complet fonctionne correctement.</text:p>
      <text:p text:style-name="Text_20_body">Le même test a été réalisé dans la version distante en modifiant l’état de la partie dans la base de données MySQL. Le résultat obtenu a également été correct.<text:bookmark-end text:name="X3d8208b476d890e041f904af29e0c91a6b96c2a"/></text:p>
      <text:h text:style-name="Heading_20_2" text:outline-level="2"><text:bookmark-start text:name="test-de-fin-de-partie"/>11. Test de fin de partie</text:h>
      <text:p text:style-name="First_20_Paragraph">Le programme a été testé avec un score proche de 40 afin de vérifier que la partie se termine lorsqu’un joueur atteint le score requis.<text:bookmark-end text:name="test-de-fin-de-partie"/></text:p>
      <text:h text:style-name="Heading_20_2" text:outline-level="2"><text:bookmark-start text:name="test-de-synchronisation-distante"/>12. Test de synchronisation distante</text:h>
      <text:p text:style-name="First_20_Paragraph">Dans la version distante, deux onglets ont été ouverts. L’un représentait SUD et l’autre représentait NORD. Après un coup joué dans un onglet, l’autre onglet affichait automatiquement le nouvel état du plateau.</text:p>
      <text:p text:style-name="Standard"><draw:rect text:anchor-type="as-char" style:rel-width="100%" draw:z-index="7" draw:name="Shape8" draw:style-name="gr1" draw:text-style-name="P15" svg:width="6.5004in" svg:height="0.0213in"><text:p/></draw:rect><text:bookmark-end text:name="vi.-tests-réalisés"/><text:bookmark-end text:name="test-de-synchronisation-distante"/></text:p>
      <text:h text:style-name="Heading_20_1" text:outline-level="1"><text:bookmark-start text:name="vii.-difficultés-rencontrées"/>VII. Difficultés rencontrées</text:h>
      <text:p text:style-name="First_20_Paragraph">La première difficulté a été la compréhension des règles du Songo. Certaines règles sont simples, comme le semis des graines, mais d’autres demandent plus d’attention, notamment la capture, la prise à la chaîne, la solidarité et la règle spéciale de la case 1 adverse.</text:p>
      <text:p text:style-name="Text_20_body">Une autre difficulté a concerné la version distante. Il fallait séparer correctement les rôles entre le client, le serveur et la base de données. Le navigateur devait seulement envoyer les actions du joueur et afficher le résultat, tandis que PHP devait traiter les règles du jeu et sauvegarder l’état dans MySQL.</text:p>
      <text:p text:style-name="Text_20_body"><text:soft-page-break/>Enfin, certaines erreurs de syntaxe sont apparues pendant l’ajout des nouvelles règles, notamment à cause d’accolades mal placées. Ces erreurs ont été corrigées en reprenant proprement les fonctions concernées.</text:p>
      <text:p text:style-name="Standard"><draw:rect text:anchor-type="as-char" style:rel-width="100%" draw:z-index="8" draw:name="Shape9" draw:style-name="gr1" draw:text-style-name="P15" svg:width="6.5004in" svg:height="0.0213in"><text:p/></draw:rect><text:bookmark-end text:name="vii.-difficultés-rencontrées"/></text:p>
      <text:h text:style-name="Heading_20_1" text:outline-level="1"><text:bookmark-start text:name="viii.-conclusion"/>VIII. Conclusion</text:h>
      <text:p text:style-name="First_20_Paragraph">Ce projet a permis de réaliser une application web complète du jeu du Songo en deux versions.</text:p>
      <text:p text:style-name="Text_20_body">La version locale permet à deux joueurs de jouer sur le même ordinateur. Elle utilise HTML, CSS et JavaScript, avec une logique entièrement exécutée côté navigateur.</text:p>
      <text:p text:style-name="Text_20_body">La version distante permet à deux joueurs de jouer depuis deux navigateurs différents. Elle utilise Ajax pour la communication, PHP pour le traitement des règles et MySQL pour le stockage de l’état de la partie.</text:p>
      <text:p text:style-name="Text_20_body">Le projet respecte les principales règles du jeu : semis, capture, prise à la chaîne, solidarité, interdiction de vider le camp adverse, interdiction liée à la case 7, fin de partie, et règle spéciale de la case 1 adverse après un tour complet.</text:p>
      <text:p text:style-name="Text_20_body">Ce travail a permis de mettre en pratique plusieurs notions importantes du développement web : création d’interface avec HTML/CSS, programmation JavaScript, traitement côté serveur avec PHP, échanges Ajax, gestion d’une base de données MySQL et organisation d’un projet en plusieurs fichiers.</text:p>
      <text:p text:style-name="Text_20_body">Des améliorations futures pourraient être ajoutées, comme la création de plusieurs parties simultanées, l’historique détaillé des coups, l’authentification des joueurs ou encore un mode contre ordinateur.<text:bookmark-end text:name="viii.-conclus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ptos" fo:font-size="12pt" fo:language="en" fo:country="US" style:letter-kerning="false" style:font-name-asian="Aptos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2pt" fo:language="en" fo:country="US" style:letter-kerning="false" style:font-name-asian="Aptos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loext:linked-style-name="Title_20_Char" style:class="chapter">
      <style:paragraph-properties fo:margin-top="0in" fo:margin-bottom="0.0555in" style:contextual-spacing="true" fo:line-height="100%" fo:text-align="center" style:justify-single-word="fals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Title" style:next-style-name="Text_20_body" loext:linked-style-name="Subtitle_20_Char" style:class="chapter">
      <style:text-properties fo:font-size="14pt" fo:letter-spacing="0.0102in"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Text_20_body"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Text_20_body"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 style:display-name="Heading 4" style:family="paragraph" style:parent-style-name="Standard" style:next-style-name="Text_20_body"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Text_20_body"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Text_20_body"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Footnote_20_Block_20_Text" style:display-name="Footnote Block Text" style:family="paragraph" style:parent-style-name="Footnote" style:next-style-name="Footnote">
      <style:paragraph-properties fo:margin-left="0.3335in" fo:margin-right="0.3335in" fo:margin-top="0.0693in" fo:margin-bottom="0.0693in" style:contextual-spacing="false" fo:text-indent="0in" style:auto-text-indent="false"/>
    </style:style>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0555in" style:contextual-spacing="false" fo:line-height="108%"/>
      <style:text-properties fo:color="#365f91" loext:opacity="100%" style:font-name="Aptos Display" fo:font-family="'Aptos Display'" style:font-family-generic="roman" style:font-pitch="variable" fo:font-weight="normal" style:font-name-asian="Aptos1" style:font-family-asian="Aptos"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1T00:56:53</meta:creation-date>
    <dc:date>2026-06-11T02:01:05.500678965</dc:date>
    <meta:generator>LibreOffice/7.3.7.2$Linux_X86_64 LibreOffice_project/30$Build-2</meta:generator>
    <meta:editing-duration>PT8M45S</meta:editing-duration>
    <meta:editing-cycles>2</meta:editing-cycles>
    <meta:document-statistic meta:table-count="0" meta:image-count="0" meta:object-count="0" meta:page-count="15" meta:paragraph-count="254" meta:word-count="3575" meta:character-count="20441" meta:non-whitespace-character-count="16734"/>
    <meta:user-defined meta:name="AppVersion">12.0000</meta:user-defined>
    <meta:template xlink:type="simple" xlink:actuate="onRequest" xlink:title="Normal.dotm" xlink:href=""/>
  </office:meta>
</office:document-meta>
</file>